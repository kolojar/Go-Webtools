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2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JetBrainsMono NFM Extra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M Extra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JetBrainsMono NFM Extra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7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style:font-name="JetBrainsMono NFM Extra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" table:default-cell-style-name="ce1"/>
        <table:table-column table:style-name="co1" table:number-columns-repeated="16357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OLD = TEST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NEW = TSXQET</text:p>
          </table:table-cell>
          <table:table-cell/>
          <table:table-cell office:value-type="string" calcext:value-type="string">
            <text:p>T</text:p>
          </table:table-cell>
          <table:table-cell table:style-name="ce5"/>
          <table:table-cell table:number-columns-repeated="7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2"/>
          <table:table-cell table:style-name="ce5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57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<text:a xlink:href="https://lcs-demo.sourceforge.net/" xlink:type="simple">https://lcs-demo.sourceforge.net/</text:a></text:p>
          </table:table-cell>
          <table:table-cell/>
          <table:table-cell office:value-type="string" calcext:value-type="string">
            <text:p>E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string" calcext:value-type="string">
            <text:p>D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57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T</text:p>
          </table:table-cell>
          <table:table-cell table:number-columns-repeated="3"/>
          <table:table-cell table:style-name="ce5"/>
          <table:table-cell table:number-columns-repeated="4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D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57"/>
        </table:table-row>
        <table:table-row table:style-name="ro1">
          <table:table-cell/>
          <table:covered-table-cell/>
          <table:table-cell table:number-columns-repeated="10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5 Letter benchmark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LCS = 20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All diff: 80</text:p>
          </table:table-cell>
          <table:table-cell/>
          <table:table-cell table:style-name="ce4" office:value-type="string" calcext:value-type="string">
            <text:p>A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3 diff: 16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All same: 304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office:value-type="string" calcext:value-type="string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8 Letter benchmark</text:p>
          </table:table-cell>
          <table:table-cell table:number-columns-repeated="10"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OLD = ACDCDCDC</text:p>
          </table:table-cell>
          <table:table-cell table:number-columns-repeated="10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NEW = ADCDCDCC</text:p>
          </table:table-cell>
          <table:table-cell table:number-columns-repeated="10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LCS = 512</text:p>
          </table:table-cell>
          <table:table-cell table:number-columns-repeated="10"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Alt = 432</text:p>
          </table:table-cell>
          <table:table-cell table:number-columns-repeated="25"/>
          <table:table-cell table:style-name="ce1" table:number-columns-repeated="16357"/>
        </table:table-row>
        <table:table-row table:style-name="ro1">
          <table:table-cell table:number-columns-repeated="27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Book test sequence</text:p>
          </table:table-cell>
          <table:table-cell table:number-columns-repeated="25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OLD = ABCBDAB</text:p>
          </table:table-cell>
          <table:table-cell table:number-columns-repeated="25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NEW = BDCABA</text:p>
          </table:table-cell>
          <table:table-cell table:number-columns-repeated="25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LCS = 336</text:p>
          </table:table-cell>
          <table:table-cell table:number-columns-repeated="25"/>
          <table:table-cell table:style-name="ce1" table:number-columns-repeated="16357"/>
        </table:table-row>
        <table:table-row table:style-name="ro1">
          <table:table-cell/>
          <table:table-cell table:style-name="ce2" office:value-type="string" calcext:value-type="string">
            <text:p>ALT = 256</text:p>
          </table:table-cell>
          <table:table-cell table:number-columns-repeated="25"/>
          <table:table-cell table:style-name="ce1" table:number-columns-repeated="16357"/>
        </table:table-row>
        <table:table-row table:style-name="ro1">
          <table:table-cell table:number-columns-repeated="27"/>
          <table:table-cell table:style-name="ce1" table:number-columns-repeated="16357"/>
        </table:table-row>
        <table:table-row table:style-name="ro1" table:number-rows-repeated="5">
          <table:table-cell/>
          <table:table-cell table:style-name="Default"/>
          <table:table-cell table:number-columns-repeated="25"/>
          <table:table-cell table:style-name="ce1" table:number-columns-repeated="16357"/>
        </table:table-row>
        <table:table-row table:style-name="ro1" table:number-rows-repeated="1048544">
          <table:table-cell table:number-columns-repeated="27"/>
          <table:table-cell table:style-name="ce1" table:number-columns-repeated="16357"/>
        </table:table-row>
        <table:table-row table:style-name="ro1">
          <table:table-cell table:number-columns-repeated="27"/>
          <table:table-cell table:style-name="ce1"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s" fo:country="C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.00.0000</text:date>, <text:time style:data-style-name="N2" text:time-value="19:45:36.71993537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07:50:22.828418173</meta:creation-date>
    <dc:date>2026-02-20T19:51:46.264406690</dc:date>
    <meta:editing-duration>PT8H17M13S</meta:editing-duration>
    <meta:editing-cycles>9</meta:editing-cycles>
    <meta:generator>LibreOffice/26.2.0.3$Linux_X86_64 LibreOffice_project/620$Build-3</meta:generator>
    <meta:document-statistic meta:table-count="1" meta:cell-count="235" meta:object-count="0"/>
  </office:meta>
</office:document-meta>
</file>